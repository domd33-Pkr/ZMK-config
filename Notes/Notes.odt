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14000003CD94BAE2E5.png" manifest:media-type="image/png"/>
  <manifest:file-entry manifest:full-path="Pictures/10000000000001FF000002548C502034.png" manifest:media-type="image/png"/>
  <manifest:file-entry manifest:full-path="Pictures/100000000000077D00000210F475FDE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e5a6c" officeooo:paragraph-rsid="001e5a6c"/>
    </style:style>
    <style:style style:name="P2" style:family="paragraph" style:parent-style-name="Standard">
      <style:paragraph-properties fo:break-before="page"/>
      <style:text-properties officeooo:rsid="001e5a6c" officeooo:paragraph-rsid="001e5a6c"/>
    </style:style>
    <style:style style:name="T1" style:family="text">
      <style:text-properties officeooo:rsid="001efd38"/>
    </style:style>
    <style:style style:name="T2" style:family="text">
      <style:text-properties officeooo:rsid="001f3c7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">refaire les index pour matcher un pattern plus intelligible</text:span></text:p>
      <text:p text:style-name="Standard">- <text:span text:style-name="T1">regarder pour battery (3.7V VS 4.2V)</text:span></text:p>
      <text:p text:style-name="Standard">- <text:span text:style-name="T1">Wirer à l’extérieur du board</text:span></text:p>
      <text:p text:style-name="Standard">-<text:span text:style-name="T2">Voir si je peux updater vers node.js 24</text:span></text:p>
      <text:p text:style-name="Standard"><draw:frame draw:style-name="fr1" draw:name="Image3" text:anchor-type="char" svg:width="17.59cm" svg:height="4.844cm" draw:z-index="2"><draw:image xlink:href="Pictures/100000000000077D00000210F475FDE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1"/>
      <text:p text:style-name="P2"><draw:frame draw:style-name="fr2" draw:name="Image1" text:anchor-type="char" svg:x="0.674cm" svg:y="1.799cm" svg:width="7.036cm" svg:height="12.873cm" draw:z-index="0"><draw:image xlink:href="Pictures/1000000000000214000003CD94BAE2E5.png" xlink:type="simple" xlink:show="embed" xlink:actuate="onLoad" draw:mime-type="image/png"/></draw:frame><draw:frame draw:style-name="fr2" draw:name="Image2" text:anchor-type="char" svg:x="10.469cm" svg:y="2.794cm" svg:width="6.759cm" svg:height="7.885cm" draw:z-index="1"><draw:image xlink:href="Pictures/10000000000001FF000002548C502034.png" xlink:type="simple" xlink:show="embed" xlink:actuate="onLoad" draw:mime-type="image/png"/></draw:frame>Main gauche<text:tab/><text:tab/><text:tab/><text:tab/><text:tab/><text:tab/><text:tab/><text:tab/>Main Droit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9T12:47:28.005743950</meta:creation-date>
    <dc:date>2026-05-21T13:15:58.913038803</dc:date>
    <meta:editing-duration>PT5M57S</meta:editing-duration>
    <meta:editing-cycles>3</meta:editing-cycles>
    <meta:generator>LibreOffice/25.2.3.2$Linux_X86_64 LibreOffice_project/520$Build-2</meta:generator>
    <meta:document-statistic meta:table-count="0" meta:image-count="3" meta:object-count="0" meta:page-count="2" meta:paragraph-count="5" meta:word-count="35" meta:character-count="199" meta:non-whitespace-character-count="162"/>
  </office:meta>
</office:document-meta>
</file>