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/>
          <table:table-cell/>
          <table:table-cell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SHIFT L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SHIFT R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ALT L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ALT R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CTRL L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CTRL R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mo</text:p>
          </table:table-cell>
          <table:table-cell office:value-type="float" office:value="3" calcext:value-type="float">
            <text:p>3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TER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PC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E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P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WN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IGH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/>
          <table:table-cell/>
          <table:table-cell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</text:p>
          </table:table-cell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C</text:p>
          </table:table-cell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</text:p>
          </table:table-cell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5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4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RAVE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</text:p>
          </table:table-cell>
          <table:table-cell/>
          <table:table-cell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Ke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21:07:58.969134830</dc:date>
    <meta:editing-duration>PT35M23S</meta:editing-duration>
    <meta:editing-cycles>6</meta:editing-cycles>
    <meta:generator>LibreOffice/25.2.3.2$Linux_X86_64 LibreOffice_project/520$Build-2</meta:generator>
    <meta:document-statistic meta:table-count="18" meta:cell-count="1697" meta:object-count="0"/>
  </office:meta>
</office:document-meta>
</file>