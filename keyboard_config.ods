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s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s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 table:number-columns-repeated="3"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C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table:style-name="ce1" office:value-type="string" calcext:value-type="string">
            <text:p>&amp;bt</text:p>
          </table:table-cell>
          <table:table-cell office:value-type="string" calcext:value-type="string">
            <text:p>BT_SEL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table:style-name="ce2" office:value-type="string" calcext:value-type="string">
            <text:p>&amp;bootlo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table:style-name="ce2" office:value-type="string" calcext:value-type="string">
            <text:p>&amp;bootlo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Ke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  <table:table-row table:style-name="ro1">
          <table:table-cell table:style-name="ce2" office:value-type="string" calcext:value-type="string">
            <text:p>&amp;bootload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21:07:58.969134830</dc:date>
    <meta:editing-duration>PT35M23S</meta:editing-duration>
    <meta:editing-cycles>6</meta:editing-cycles>
    <meta:generator>LibreOffice/25.2.3.2$Linux_X86_64 LibreOffice_project/520$Build-2</meta:generator>
    <meta:document-statistic meta:table-count="18" meta:cell-count="1697" meta:object-count="0"/>
  </office:meta>
</office:document-meta>
</file>